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1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2" style:family="paragraph" style:parent-style-name="Tabletext">
      <style:paragraph-properties style:snap-to-layout-grid="false"/>
    </style:style>
    <style:style style:name="P13" style:family="paragraph" style:parent-style-name="Tabletext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5" style:family="paragraph" style:parent-style-name="Title">
      <style:paragraph-properties fo:text-align="end" style:justify-single-word="false"/>
    </style:style>
    <style:style style:name="P16" style:family="paragraph" style:parent-style-name="Title">
      <style:text-properties fo:font-size="14pt" style:font-size-asian="14pt" style:font-size-complex="14pt"/>
    </style:style>
    <style:style style:name="P17" style:family="paragraph" style:parent-style-name="Title">
      <style:paragraph-properties fo:break-before="page"/>
    </style:style>
    <style:style style:name="P18" style:family="paragraph" style:parent-style-name="Title">
      <style:paragraph-properties fo:break-before="page">
        <style:tab-stops>
          <style:tab-stop style:position="1.524cm"/>
          <style:tab-stop style:position="16.51cm" style:type="right"/>
        </style:tab-stops>
      </style:paragraph-properties>
    </style:style>
    <style:style style:name="P19" style:family="paragraph" style:parent-style-name="Title" style:master-page-name="Standard">
      <style:paragraph-properties fo:text-align="end" style:justify-single-word="false" style:page-number="auto"/>
    </style:style>
    <style:style style:name="P20" style:family="paragraph" style:parent-style-name="Title" style:master-page-name="Convert_20_1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ymbol"/>
    </style:style>
    <style:style style:name="T3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ubject>&lt;netfocus&gt;</text:subject></text:p>
      <text:p text:style-name="P15"><text:title>软件体系结构文档</text:title></text:p>
      <text:p text:style-name="P15"/>
      <text:p text:style-name="P15"><text:span text:style-name="T1">版本 &lt;1.0&gt;</text:span></text:p>
      <text:p text:style-name="InfoBlue"/>
      <text:p text:style-name="InfoBlue"/>
      <text:p text:style-name="InfoBlue">[注意：以下模板供与 Rational Unified Process 一起使用。包含在方括号中以蓝色斜体（style=InfoBlue）显示的文本是用于向作者提供指导，在发布文档之前应将这些文本删除。在此样式之后输入的段落将自动设置为正常（style=Body Text）。]</text:p>
      <text:p text:style-name="InfoBlue">[要在 Microsoft Word 中定制自动字段（选中时显示灰色背景），请选择“文件&gt;属性”，然后用相应的信息替换本文档的“标题”、“主题”和“公司”字段。关闭对话框后，可以通过选择“编辑&gt;全选”（或 Ctrl-A），然后按 F9 键，让整个文档中的自动字段更新，或者只需单击字段并按 F9 键。此操作必须对页眉和页脚分开进行。Alt-F9 将在显示字段名称和显示字段内容之间切换。关于处理字段的更多信息，请参阅 Word 帮助。] </text:p>
      <text:p text:style-name="P16"/>
      <text:p text:style-name="P20">修订历史记录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日期</text:p>
          </table:table-cell>
          <table:table-cell table:style-name="Table1.A1" office:value-type="string">
            <text:p text:style-name="P13">版本</text:p>
          </table:table-cell>
          <table:table-cell table:style-name="Table1.A1" office:value-type="string">
            <text:p text:style-name="P13">描述</text:p>
          </table:table-cell>
          <table:table-cell table:style-name="Table1.D1" office:value-type="string">
            <text:p text:style-name="P13">作者</text:p>
          </table:table-cell>
        </table:table-row>
        <table:table-row table:style-name="Table1.1">
          <table:table-cell table:style-name="Table1.A1" office:value-type="string">
            <text:p text:style-name="P12">&lt;dd/mmm/yy&gt;</text:p>
          </table:table-cell>
          <table:table-cell table:style-name="Table1.A1" office:value-type="string">
            <text:p text:style-name="P12">&lt;x.x&gt;</text:p>
          </table:table-cell>
          <table:table-cell table:style-name="Table1.A1" office:value-type="string">
            <text:p text:style-name="P12">&lt;详细信息&gt;</text:p>
          </table:table-cell>
          <table:table-cell table:style-name="Table1.D1" office:value-type="string">
            <text:p text:style-name="P12">&lt;名称&g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</table:table>
      <text:p text:style-name="Standard"/>
      <text:p text:style-name="P17">目录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4">1. 简介<text:tab/>4</text:p>
          <text:p text:style-name="P11">1.1 目的<text:tab/>4</text:p>
          <text:p text:style-name="P11">1.2 范围<text:tab/>4</text:p>
          <text:p text:style-name="P11">1.3 定义、首字母缩写和缩写<text:tab/>4</text:p>
          <text:p text:style-name="P11">1.4 参考资料<text:tab/>4</text:p>
          <text:p text:style-name="P11">1.5 概述<text:tab/>4</text:p>
          <text:p text:style-name="P14">2. 体系结构表示 <text:tab/>4</text:p>
          <text:p text:style-name="P14">3. 体系结构目标和约束 <text:tab/>4</text:p>
          <text:p text:style-name="P14">4. 用例视图 <text:tab/>4</text:p>
          <text:p text:style-name="P14">5. 逻辑视图 <text:tab/>4</text:p>
          <text:p text:style-name="P11">5.1 概述<text:tab/>5</text:p>
          <text:p text:style-name="P11">5.2 重要体系结构设计包<text:tab/>5</text:p>
          <text:p text:style-name="P11">5.3 用例实现<text:tab/>5</text:p>
          <text:p text:style-name="P14">6. 流程视图 <text:tab/>5</text:p>
          <text:p text:style-name="P14">7. 部署视图 <text:tab/>5</text:p>
          <text:p text:style-name="P14">8. 实施视图 <text:tab/>5</text:p>
          <text:p text:style-name="P11">8.1 概述<text:tab/>5</text:p>
          <text:p text:style-name="P11">8.2 层<text:tab/>5</text:p>
          <text:p text:style-name="P14">9. 数据视图（可选）<text:tab/>5</text:p>
          <text:p text:style-name="P14">10. 大小和性能 <text:tab/>5</text:p>
          <text:p text:style-name="P14">11. 质量 <text:tab/>5</text:p>
        </text:index-body>
      </text:table-of-content>
      <text:p text:style-name="P18"><text:title>软件体系结构文档</text:title> </text:p>
      <text:list xml:id="list1951411069" text:style-name="Outline">
        <text:list-item>
          <text:h text:style-name="Heading_20_1" text:outline-level="1">简介</text:h>
        </text:list-item>
      </text:list>
      <text:p text:style-name="InfoBlue">[<text:span text:style-name="Strong_20_Emphasis">软件体系结构文档</text:span>的简介提供了整个<text:span text:style-name="Strong_20_Emphasis">软件体系结构文档</text:span>的概述。它包括<text:span text:style-name="Strong_20_Emphasis">软件体系结构文档</text:span>的目的、范围、定义、首字母缩写、缩写、引用和概述。]</text:p>
      <text:list xml:id="list1691100804" text:continue-numbering="true" text:style-name="Outline">
        <text:list-item>
          <text:list>
            <text:list-item>
              <text:h text:style-name="Heading_20_2" text:outline-level="2">目的</text:h>
            </text:list-item>
          </text:list>
        </text:list-item>
      </text:list>
      <text:p text:style-name="P5">本文档使用许多不同的体系结构视图来描述系统的多个方面，对系统进行了全面的体系结构概述。其目的是捕获和传达对系统作出的重要体系结构决策。</text:p>
      <text:p text:style-name="P5"/>
      <text:p text:style-name="InfoBlue">[此节定义整个项目文档中<text:span text:style-name="Strong_20_Emphasis">软件体系结构文档</text:span>的角色或目的，并简要描述该文档的结构。确定本文档的特定读者，指明期望他们以何方式使用本文档。]</text:p>
      <text:list xml:id="list1167091687" text:continue-numbering="true" text:style-name="Outline">
        <text:list-item>
          <text:list>
            <text:list-item>
              <text:h text:style-name="Heading_20_2" text:outline-level="2">范围</text:h>
            </text:list-item>
          </text:list>
        </text:list-item>
      </text:list>
      <text:p text:style-name="InfoBlue">[关于以下方面的简要描述：软件体系结构文档适用于哪些方面；本文档影响哪些方面。]</text:p>
      <text:list xml:id="list976298615" text:continue-numbering="true" text:style-name="Outline">
        <text:list-item>
          <text:list>
            <text:list-item>
              <text:h text:style-name="Heading_20_2" text:outline-level="2">定义、首字母缩写和缩写</text:h>
            </text:list-item>
          </text:list>
        </text:list-item>
      </text:list>
      <text:p text:style-name="InfoBlue">[此子节提供所有术语、首字母缩写和缩写的定义，这些术语、首字母缩写和缩写对于正确解释<text:span text:style-name="Strong_20_Emphasis">软件体系结构文档</text:span>是必需的。可以通过引用项目的词汇表来提供此信息。]</text:p>
      <text:list xml:id="list510222482" text:continue-numbering="true" text:style-name="Outline">
        <text:list-item>
          <text:list>
            <text:list-item>
              <text:h text:style-name="Heading_20_2" text:outline-level="2">参考资料</text:h>
            </text:list-item>
          </text:list>
        </text:list-item>
      </text:list>
      <text:p text:style-name="InfoBlue">[此子节提供一份在<text:span text:style-name="Strong_20_Emphasis">软件体系结构文档</text:span>中的其他地方引用的所有文档的完整列表。用标题、报告号（如果适用）、日期和出版组织确定每份文档。指定从哪些来源可以获得这些参考资料。可以通过引用附录或其他文档来提供此信息。]</text:p>
      <text:list xml:id="list1188999407" text:continue-numbering="true" text:style-name="Outline">
        <text:list-item>
          <text:list>
            <text:list-item>
              <text:h text:style-name="Heading_20_2" text:outline-level="2">概述</text:h>
            </text:list-item>
          </text:list>
        </text:list-item>
      </text:list>
      <text:p text:style-name="InfoBlue">[此子节描述<text:span text:style-name="Strong_20_Emphasis">软件体系结构文档</text:span>的剩余部分包含哪些内容，并解释<text:span text:style-name="Strong_20_Emphasis">软件体系结构文档</text:span>是如何组织的。]</text:p>
      <text:list xml:id="list1959645018" text:continue-numbering="true" text:style-name="Outline">
        <text:list-item>
          <text:h text:style-name="Heading_20_1" text:outline-level="1">体系结构表示 </text:h>
        </text:list-item>
      </text:list>
      <text:p text:style-name="InfoBlue">[此节描述用于当前系统的是何种软件体系结构，以及它是如何表示的。它枚举了<text:span text:style-name="Strong_20_Emphasis">用例视图</text:span>、<text:span text:style-name="Strong_20_Emphasis">逻辑视图</text:span>、<text:span text:style-name="Strong_20_Emphasis">流程视图</text:span>、<text:span text:style-name="Strong_20_Emphasis">部署视图</text:span>和<text:span text:style-name="Strong_20_Emphasis">实施视图</text:span>这些必要的视图，对于每种视图，它解释了视图所包含的模型元素的类型。]</text:p>
      <text:list xml:id="list579070391" text:continue-numbering="true" text:style-name="Outline">
        <text:list-item>
          <text:h text:style-name="Heading_20_1" text:outline-level="1">体系结构目标和约束 </text:h>
        </text:list-item>
      </text:list>
      <text:p text:style-name="InfoBlue">[此节描述对于体系结构具有重大影响的软件需求和目标，例如：安全性、隐私性、可现用产品的使用、可移植性、分发和重用。它还捕获可能适用的特定约束：设计和实施策略、开发工具、团队结构、进度安排、旧代码等等。]</text:p>
      <text:list xml:id="list822120237" text:continue-numbering="true" text:style-name="Outline">
        <text:list-item>
          <text:h text:style-name="Heading_20_1" text:outline-level="1">用例视图 </text:h>
        </text:list-item>
      </text:list>
      <text:p text:style-name="InfoBlue">[此节列出用例模型中满足以下条件的用例或场景：它们代表了最终系统的一些重要的核心功能，或者它们在很大的体系结构范围内运用了许多体系结构元素，或者它们强调或说明了某个具体而微妙的体系结构点。]</text:p>
      <text:list xml:id="list1246985365" text:continue-numbering="true" text:style-name="Outline">
        <text:list-item>
          <text:h text:style-name="Heading_20_1" text:outline-level="1">逻辑视图 </text:h>
        </text:list-item>
      </text:list>
      <text:p text:style-name="InfoBlue">[此节描述设计模型在体系结构上很重要的部分，例如将模型分解成众多子系统和包。对于每个重要的包，又描述将包分解成类和类实用程序。您应简介重要体系结构类，并描述它们的职责，以及少数非常重要的关系、操作和属性。]</text:p>
      <text:list xml:id="list1572065386" text:continue-numbering="true" text:style-name="Outline">
        <text:list-item>
          <text:list>
            <text:list-item>
              <text:h text:style-name="Heading_20_2" text:outline-level="2"><text:soft-page-break/>概述</text:h>
            </text:list-item>
          </text:list>
        </text:list-item>
      </text:list>
      <text:p text:style-name="InfoBlue">[此子节描述设计模型在程序包层次结构和层上的整体分解。]</text:p>
      <text:list xml:id="list1993580365" text:continue-numbering="true" text:style-name="Outline">
        <text:list-item>
          <text:list>
            <text:list-item>
              <text:h text:style-name="Heading_20_2" text:outline-level="2">重要体系结构设计包</text:h>
            </text:list-item>
          </text:list>
        </text:list-item>
      </text:list>
      <text:p text:style-name="InfoBlue">[对于每个重要的设计包，均单独设立一个子节，子节的内容包括设计包名称、其简要描述以及一个具有设计包中所含所有重要类和包的图。</text:p>
      <text:p text:style-name="InfoBlue">对于包中的每个重要类，均包含其名称和简要描述，另外，还可以选择包含关于它的一些主要职责、操作和属性的描述。</text:p>
      <text:list xml:id="list1847280965" text:continue-numbering="true" text:style-name="Outline">
        <text:list-item>
          <text:list>
            <text:list-item>
              <text:h text:style-name="Heading_20_2" text:outline-level="2">用例实现</text:h>
            </text:list-item>
          </text:list>
        </text:list-item>
      </text:list>
      <text:p text:style-name="InfoBlue">[此节通过提供几个选择的用例（或场景）实现，来说明软件实际如何工作，并解释各个不同的设计模型元素如何对它们的功能起作用。]</text:p>
      <text:list xml:id="list1862040980" text:continue-numbering="true" text:style-name="Outline">
        <text:list-item>
          <text:h text:style-name="Heading_20_1" text:outline-level="1">流程视图 </text:h>
        </text:list-item>
      </text:list>
      <text:p text:style-name="InfoBlue">[此节描述将系统分解成轻量级进程（单个的控制线程）和重量级进程（轻量级进程的组合）。节的组织方式是将进行通信或交互的进程分为多个组。描述进程之间的主要通信方式（例如消息传递、中断和集合）。]</text:p>
      <text:list xml:id="list825510033" text:continue-numbering="true" text:style-name="Outline">
        <text:list-item>
          <text:h text:style-name="Heading_20_1" text:outline-level="1">部署视图 </text:h>
        </text:list-item>
      </text:list>
      <text:p text:style-name="InfoBlue">[此节描述用以部署和运行软件的一个或多个物理网络（硬件）配置。它是部署模型的视图。对于每个配置，它至少应指示执行软件的物理节点（计算机、CPU），以及节点之间的互连（总线、LAN、点到点等等）。还包括<text:span text:style-name="Strong_20_Emphasis">流程视图</text:span>的流程到物理节点上的映射。]</text:p>
      <text:list xml:id="list237228268" text:continue-numbering="true" text:style-name="Outline">
        <text:list-item>
          <text:h text:style-name="Heading_20_1" text:outline-level="1">实施视图 </text:h>
        </text:list-item>
      </text:list>
      <text:p text:style-name="InfoBlue">[此节描述实施模型的整体结构，实施模型中从软件到层和子系统的分解，以及任何重要体系结构组件。]</text:p>
      <text:list xml:id="list2147798348" text:continue-numbering="true" text:style-name="Outline">
        <text:list-item>
          <text:list>
            <text:list-item>
              <text:h text:style-name="Heading_20_2" text:outline-level="2">概述</text:h>
            </text:list-item>
          </text:list>
        </text:list-item>
      </text:list>
      <text:p text:style-name="InfoBlue">[此子节命名和定义了各个层及其内容，用来规定包含到给定的层所满足的规则，以及层与层之间的边界。包括一个显示层与层之间关系的组件图。]</text:p>
      <text:list xml:id="list1776159317" text:continue-numbering="true" text:style-name="Outline">
        <text:list-item>
          <text:list>
            <text:list-item>
              <text:h text:style-name="Heading_20_2" text:outline-level="2">层</text:h>
            </text:list-item>
          </text:list>
        </text:list-item>
      </text:list>
      <text:p text:style-name="InfoBlue">[对于每一个层，均包含以其名称命名的一个子节，位于该层中的子系统的枚举，以及一个组件图。]</text:p>
      <text:p text:style-name="Standard"/>
      <text:list xml:id="list521410776" text:continue-numbering="true" text:style-name="Outline">
        <text:list-item>
          <text:h text:style-name="Heading_20_1" text:outline-level="1">数据视图（可选）</text:h>
        </text:list-item>
      </text:list>
      <text:p text:style-name="InfoBlue">[描述系统持久数据存储透视图。如果持久数据很少或根本没有，或者设计模型和数据模型之间的转换是不重要的，那么此节是可选的。]</text:p>
      <text:list xml:id="list252095729" text:continue-numbering="true" text:style-name="Outline">
        <text:list-item>
          <text:h text:style-name="Heading_20_1" text:outline-level="1">大小和性能 </text:h>
        </text:list-item>
      </text:list>
      <text:p text:style-name="InfoBlue">[描述影响体系结构的软件主要规模特征以及目标性能约束。]</text:p>
      <text:list xml:id="list769628676" text:continue-numbering="true" text:style-name="Outline">
        <text:list-item>
          <text:h text:style-name="Heading_20_1" text:outline-level="1">质量 </text:h>
        </text:list-item>
      </text:list>
      <text:p text:style-name="InfoBlue">[描述软件体系结构如何对系统的所有能力（而不是功能）起作用，这些能力有：可扩展性、可靠性、可移植性等等。如果这些特征具有特殊的重要性（例如安全性或隐私含义），则必须清楚地描述它们。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SimSun" fo:font-size="10pt" fo:language="en" fo:country="US" style:font-name-asian="SimSu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1.27cm" fo:margin-right="0cm" fo:margin-top="0.212cm" fo:margin-bottom="0.106cm" fo:text-indent="-1.27cm" style:auto-text-indent="false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5.08cm" fo:margin-right="0cm" fo:margin-top="0.423cm" fo:margin-bottom="0.106cm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5.08cm" fo:margin-right="0cm" fo:margin-top="0.423cm" fo:margin-bottom="0.106cm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5.08cm" fo:margin-right="0cm" fo:margin-top="0.423cm" fo:margin-bottom="0.106cm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5.08cm" fo:margin-right="0cm" fo:margin-top="0.423cm" fo:margin-bottom="0.106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5.08cm" fo:margin-right="0cm" fo:margin-top="0.423cm" fo:margin-bottom="0.106cm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8pt" fo:language="en" fo:country="AU" fo:font-style="italic" style:font-size-asian="18pt" style:font-style-asian="italic" style:font-size-complex="18pt" style:font-style-complex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Times New Roman"/>
    </style:style>
    <style:style style:name="WW8Num4z0" style:family="text">
      <style:text-properties style:font-name="Symbol" style:font-name-complex="Times New Roman"/>
    </style:style>
    <style:style style:name="WW8Num5z0" style:family="text">
      <style:text-properties style:font-name="Symbol" style:font-name-complex="Times New Roman"/>
    </style:style>
    <style:style style:name="WW8Num6z0" style:family="text">
      <style:text-properties style:font-name="Symbol" style:font-name-complex="Times New Roman"/>
    </style:style>
    <style:style style:name="WW8Num7z0" style:family="text">
      <style:text-properties style:font-name="Symbol" style:font-name-complex="Times New Roman"/>
    </style:style>
    <style:style style:name="WW8Num8z0" style:family="text">
      <style:text-properties style:font-name="Symbol" style:font-name-complex="Times New Roman"/>
    </style:style>
    <style:style style:name="WW8Num9z0" style:family="text">
      <style:text-properties style:font-name="Symbol" style:font-name-complex="Times New Roman"/>
    </style:style>
    <style:style style:name="WW8Num10z0" style:family="text">
      <style:text-properties style:font-name="Symbol" style:font-name-complex="Times New Roman"/>
    </style:style>
    <style:style style:name="WW8Num11z0" style:family="text">
      <style:text-properties style:font-name="Symbol" style:font-name-complex="Times New Roman"/>
    </style:style>
    <style:style style:name="WW8Num12z0" style:family="text">
      <style:text-properties style:font-name="Symbol" style:font-name-complex="Times New Roman"/>
    </style:style>
    <style:style style:name="WW8Num13z0" style:family="text">
      <style:text-properties style:font-name="Symbol" style:font-name-complex="Times New Roman"/>
    </style:style>
    <style:style style:name="WW8Num14z0" style:family="text">
      <style:text-properties style:font-name="Symbol" style:font-name-complex="Times New Roman"/>
    </style:style>
    <style:style style:name="WW8Num15z0" style:family="text">
      <style:text-properties style:font-name="Symbol" style:font-name-complex="Times New Roman"/>
    </style:style>
    <style:style style:name="WW8Num16z0" style:family="text">
      <style:text-properties style:font-name="Symbol" style:font-name-complex="Times New Roman"/>
    </style:style>
    <style:style style:name="WW8Num17z0" style:family="text">
      <style:text-properties style:font-name="Symbol" style:font-name-complex="Times New Roman"/>
    </style:style>
    <style:style style:name="WW8Num18z0" style:family="text">
      <style:text-properties style:font-name="Symbol" style:font-name-complex="Times New Roman"/>
    </style:style>
    <style:style style:name="WW8Num19z0" style:family="text">
      <style:text-properties style:font-name="Symbol" style:font-name-complex="Times New Roman"/>
    </style:style>
    <style:style style:name="WW8Num20z0" style:family="text">
      <style:text-properties style:font-name="Symbol" style:font-name-complex="Times New Roman"/>
    </style:style>
    <style:style style:name="WW8NumSt6z0" style:family="text">
      <style:text-properties style:font-name="Symbol" style:font-name-complex="Times New Roman"/>
    </style:style>
    <style:style style:name="WW8NumSt19z0" style:family="text">
      <style:text-properties style:font-name="Symbo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 style:font-size-complex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5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text:name="Company"/></text:p>
        <text:p text:style-name="MP4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<text:subject>&lt;netfocus&gt;</text:subject></text:p>
            </table:table-cell>
            <table:table-cell table:style-name="Table3.B1" office:value-type="string">
              <text:p text:style-name="MP6"><text:s text:c="2"/>版本：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MP5"><text:title>软件体系结构文档</text:title></text:p>
            </table:table-cell>
            <table:table-cell table:style-name="Table3.B1" office:value-type="string">
              <text:p text:style-name="MP5"><text:s text:c="2"/>日期：&lt;dd/mmm/yy&gt;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>&lt;文档标识&gt;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7">机密</text:p>
            </table:table-cell>
            <table:table-cell table:style-name="Table2.A1" office:value-type="string">
              <text:p text:style-name="MP8"><text:span text:style-name="MT1"></text:span><text:user-defined text:name="Company"/>，<text:date style:data-style-name="N115" text:date-value="2009-01-19T17:43:09">2009</text:date></text:p>
            </table:table-cell>
            <table:table-cell table:style-name="Table2.A1" office:value-type="string">
              <text:p text:style-name="MP9">第 <text:span text:style-name="Page_20_Number"><text:page-number text:select-page="current">5</text:page-number></text:span><text:span text:style-name="Page_20_Number"> 页（共 </text:span><text:span text:style-name="Page_20_Number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软件体系结构文档</dc:title>
    <dc:subject>&lt;netfocus&gt;</dc:subject>
    <meta:creation-date>2009-01-19T17:17:23</meta:creation-date>
    <meta:editing-cycles>2</meta:editing-cycles>
    <meta:editing-duration>PT00H25M49S</meta:editing-duration>
    <meta:initial-creator>Seaman Wang</meta:initial-creator>
    <meta:generator>OpenOffice.org/3.0$Unix OpenOffice.org_project/300m9$Build-9358</meta:generator>
    <meta:document-statistic meta:table-count="3" meta:image-count="0" meta:object-count="0" meta:page-count="5" meta:paragraph-count="90" meta:word-count="1237" meta:character-count="2502"/>
    <dc:date>2009-01-19T17:43:09</dc:date>
    <dc:creator>Seaman Wang</dc:creator>
    <meta:user-defined meta:name="Company"/>
    <meta:user-defined meta:name="Company Name"/>
    <meta:user-defined meta:name="Info 3"/>
    <meta:user-defined meta:name="Info 4"/>
  </office:meta>
</office:document-meta>
</file>